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51cm" svg:stroke-color="#ff8000" draw:marker-start-width="0.279cm" draw:marker-end-width="0.279cm" draw:fill="none" loext:fill-use-slide-background="false" draw:textarea-vertical-align="middle" draw:auto-grow-height="false" fo:min-height="0.84cm" fo:min-width="1.355cm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ff8000" draw:marker-start-width="0.279cm" draw:marker-end-width="0.279cm" draw:fill="none" loext:fill-use-slide-background="false" draw:textarea-vertical-align="middle" draw:auto-grow-height="false" fo:min-height="0.305cm" fo:min-width="1.355c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51cm" svg:stroke-color="#ff8000" draw:marker-start-width="0.279cm" draw:marker-end-width="0.279cm" draw:fill="none" loext:fill-use-slide-background="false" draw:textarea-vertical-align="middle" draw:auto-grow-height="false" fo:min-height="0.305cm" fo:min-width="1.355c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1cm" svg:stroke-color="#ff8000" draw:marker-start-width="0.279cm" draw:marker-end-width="0.279cm" draw:fill="none" loext:fill-use-slide-background="false" draw:textarea-vertical-align="middle" draw:auto-grow-height="false" fo:min-height="0.305cm" fo:min-width="1.355cm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ff8000" draw:marker-start-width="0.279cm" draw:marker-end-width="0.279cm" draw:fill="none" loext:fill-use-slide-background="false" draw:textarea-vertical-align="middle" draw:auto-grow-height="false" fo:min-height="0.84cm" fo:min-width="1.355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objectwithoutfill">
      <style:graphic-properties svg:stroke-width="0.025cm" svg:stroke-color="#000000" draw:marker-start-width="0.229cm" draw:marker-end="Arrowheads_20_1" draw:marker-end-width="0.33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objectwithoutfill">
      <style:graphic-properties svg:stroke-width="0.025cm" svg:stroke-color="#000000" draw:marker-start-width="0.229cm" draw:marker-end="Arrowheads_20_2" draw:marker-end-width="0.33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objectwithoutfill">
      <style:graphic-properties svg:stroke-width="0.025cm" svg:stroke-color="#000000" draw:marker-start-width="0.229cm" draw:marker-end="Arrowheads_20_3" draw:marker-end-width="0.33cm" draw:fill="none" draw:textarea-vertical-align="middle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objectwithoutfill">
      <style:graphic-properties svg:stroke-width="0.025cm" svg:stroke-color="#000000" draw:marker-start-width="0.229cm" draw:marker-end="Arrowheads_20_4" draw:marker-end-width="0.33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svg:stroke-width="0.051cm" svg:stroke-color="#6b5e9b" draw:marker-start-width="0.279cm" draw:marker-end-width="0.279cm" draw:fill="none" loext:fill-use-slide-background="false" draw:textarea-vertical-align="middle" draw:auto-grow-height="false" fo:min-height="0.84cm" fo:min-width="1.355cm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6b5e9b" draw:marker-start-width="0.279cm" draw:marker-end-width="0.279cm" draw:fill="none" loext:fill-use-slide-background="false" draw:textarea-vertical-align="middle" draw:auto-grow-height="false" fo:min-height="0.305cm" fo:min-width="1.355cm" fo:padding-top="0.15cm" fo:padding-bottom="0.15cm" fo:padding-left="0.275cm" fo:padding-right="0.275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_20__28_Rounded_29_" svg:stroke-color="#000000" svg:stroke-linecap="round"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8000" loext:opacity="100%"/>
    </style:style>
    <style:style style:name="P8" style:family="paragraph">
      <style:text-properties fo:color="#6b5e9b" loext:opacity="100%"/>
    </style:style>
    <style:style style:name="P9" style:family="paragraph">
      <loext:graphic-properties draw:fill="none" draw:fill-color="#ffffff"/>
      <style:text-properties fo:color="#6b5e9b" loext:opacity="100%"/>
    </style:style>
    <style:style style:name="P10" style:family="paragraph">
      <style:text-properties fo:color="#6b5e9b" loext:opacity="100%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6b5e9b" loext:opacity="100%"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8000" loext:opacity="100%" fo:font-size="15pt" style:font-size-asian="15pt" style:font-size-complex="15pt"/>
    </style:style>
    <style:style style:name="T5" style:family="text">
      <style:text-properties fo:color="#6b5e9b" loext:opacity="100%" fo:font-size="15pt" style:font-size-asian="15pt" style:font-size-complex="15pt"/>
    </style:style>
    <style:style style:name="T6" style:family="text">
      <style:text-properties fo:color="#6b5e9b" loext:opacity="100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.905cm" svg:height="1.14cm" svg:x="3.445cm" svg:y="1.905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.905cm" svg:height="0.605cm" svg:x="3.446cm" svg:y="3.041cm">
          <text:p text:style-name="P3"><text:span text:style-name="T2">Ox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905cm" svg:height="0.605cm" svg:x="3.447cm" svg:y="3.642cm">
          <text:p text:style-name="P1"><text:span text:style-name="T2">Ox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905cm" svg:height="0.605cm" svg:x="3.448cm" svg:y="4.243cm">
          <text:p text:style-name="P1"><text:span text:style-name="T2">Ox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.905cm" svg:height="1.14cm" svg:x="7.946cm" svg:y="0.605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7.947cm" svg:y="1.741cm">
          <text:p text:style-name="P3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7.948cm" svg:y="2.342cm">
          <text:p text:style-name="P3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1.905cm" svg:height="1.14cm" svg:x="9.847cm" svg:y="3.605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9.848cm" svg:y="4.741cm">
          <text:p text:style-name="P3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9.849cm" svg:y="5.342cm">
          <text:p text:style-name="P3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905cm" svg:height="1.14cm" svg:x="6.948cm" svg:y="5.105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6.949cm" svg:y="6.241cm">
          <text:p text:style-name="P3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6.95cm" svg:y="6.842cm">
          <text:p text:style-name="P3"><text:span text:style-name="T3">y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351cm" svg:y1="3.343cm" svg:x2="7.946cm" svg:y2="1.175cm" draw:start-shape="id1" draw:start-glue-point="1" draw:end-shape="id2" draw:end-glue-point="3" svg:d="M5351 3343h1297v-2168h1298" svg:viewBox="0 0 2596 2169">
          <text:p/>
        </draw:connector>
        <draw:connector draw:style-name="gr7" draw:text-style-name="P4" draw:layer="layout" svg:x1="5.352cm" svg:y1="3.944cm" svg:x2="9.847cm" svg:y2="4.175cm" draw:start-shape="id3" draw:start-glue-point="1" draw:end-shape="id4" draw:end-glue-point="3" svg:d="M5352 3944h2247v231h2248" svg:viewBox="0 0 4496 232">
          <text:p/>
        </draw:connector>
        <draw:connector draw:style-name="gr8" draw:text-style-name="P4" draw:layer="layout" svg:x1="5.353cm" svg:y1="4.545cm" svg:x2="6.948cm" svg:y2="5.675cm" draw:start-shape="id5" draw:start-glue-point="1" draw:end-shape="id6" draw:end-glue-point="3" svg:d="M5353 4545h797v1130h798" svg:viewBox="0 0 1596 1131">
          <text:p/>
        </draw:connector>
        <draw:frame draw:style-name="gr9" draw:text-style-name="P5" draw:layer="layout" svg:width="2.245cm" svg:height="0.839cm" svg:x="9.66cm" svg:y="2.775cm">
          <draw:text-box>
            <text:p><text:span text:style-name="T3">@Point</text:span></text:p>
          </draw:text-box>
        </draw:frame>
        <draw:frame draw:style-name="gr9" draw:text-style-name="P5" draw:layer="layout" svg:width="2.539cm" svg:height="0.839cm" svg:x="3.175cm" svg:y="1.066cm">
          <draw:text-box>
            <text:p><text:span text:style-name="T3">@Point[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4" draw:layer="layout" svg:width="1.905cm" svg:height="1.14cm" svg:x="2.108cm" svg:y="2.103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2.109cm" svg:y="3.239cm">
          <text:p text:style-name="P3"><text:span text:style-name="T3">se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1.905cm" svg:height="0.605cm" svg:x="2.11cm" svg:y="3.84cm">
          <text:p text:style-name="P3"><text:span text:style-name="T3">Ox...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92cm" svg:height="0.839cm" svg:x="2.076cm" svg:y="1.267cm">
          <draw:text-box>
            <text:p><text:span text:style-name="T3">@Car</text:span></text:p>
          </draw:text-box>
        </draw:frame>
        <draw:custom-shape draw:style-name="gr5" draw:text-style-name="P4" xml:id="id8" draw:id="id8" draw:layer="layout" svg:width="1.905cm" svg:height="1.14cm" svg:x="5.209cm" svg:y="5.303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5.21cm" svg:y="6.439cm">
          <text:p text:style-name="P3"><text:span text:style-name="T3">ag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16cm" svg:height="0.839cm" svg:x="4.777cm" svg:y="4.467cm">
          <draw:text-box>
            <text:p><text:span text:style-name="T3">@Person</text:span></text:p>
          </draw:text-box>
        </draw:frame>
        <draw:connector draw:style-name="gr11" draw:text-style-name="P4" draw:layer="layout" svg:x1="4.015cm" svg:y1="4.142cm" svg:x2="5.209cm" svg:y2="5.873cm" draw:start-shape="id7" draw:start-glue-point="1" draw:end-shape="id8" draw:end-glue-point="3" svg:d="M4015 4142h596v1731h598" svg:viewBox="0 0 1195 1732">
          <text:p/>
        </draw:connector>
        <draw:custom-shape draw:style-name="gr12" draw:text-style-name="P4" draw:layer="layout" svg:width="1.905cm" svg:height="1.14cm" svg:x="11.109cm" svg:y="2.103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905cm" svg:height="0.605cm" svg:x="11.11cm" svg:y="3.239cm">
          <text:p text:style-name="P3"><text:span text:style-name="T3">sea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905cm" svg:height="0.605cm" svg:x="11.111cm" svg:y="3.84cm">
          <text:p text:style-name="P3"><text:span text:style-name="T3">ag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92cm" svg:height="0.839cm" svg:x="11.077cm" svg:y="1.267cm">
          <draw:text-box>
            <text:p><text:span text:style-name="T3">@Car</text:span></text:p>
          </draw:text-box>
        </draw:frame>
        <draw:custom-shape draw:style-name="gr13" draw:text-style-name="P4" draw:layer="layout" svg:width="1.905cm" svg:height="0.605cm" svg:x="11.112cm" svg:y="4.441cm">
          <text:p text:style-name="P3"><text:span text:style-name="T1">ma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3.561cm" svg:height="0.839cm" svg:x="3.175cm" svg:y="8.869cm">
          <draw:text-box>
            <text:p><text:span text:style-name="T4">Identity class</text:span></text:p>
          </draw:text-box>
        </draw:frame>
        <draw:frame draw:style-name="gr9" draw:text-style-name="P9" draw:layer="layout" svg:width="3.169cm" svg:height="0.839cm" svg:x="10.276cm" svg:y="8.87cm">
          <draw:text-box>
            <text:p text:style-name="P8"><text:span text:style-name="T5">Value class</text:span></text:p>
          </draw:text-box>
        </draw:frame>
        <draw:line draw:style-name="gr14" draw:text-style-name="P4" draw:layer="layout" svg:x1="8.955cm" svg:y1="1.035cm" svg:x2="8.955cm" svg:y2="9.925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4" draw:layer="layout" svg:width="1.905cm" svg:height="1.14cm" svg:x="2.108cm" svg:y="2.103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2.109cm" svg:y="3.239cm">
          <text:p text:style-name="P3"><text:span text:style-name="T3">se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1.905cm" svg:height="0.605cm" svg:x="2.11cm" svg:y="3.84cm">
          <text:p text:style-name="P3"><text:span text:style-name="T3">Ox...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92cm" svg:height="0.839cm" svg:x="2.076cm" svg:y="1.267cm">
          <draw:text-box>
            <text:p><text:span text:style-name="T3">@Car</text:span></text:p>
          </draw:text-box>
        </draw:frame>
        <draw:custom-shape draw:style-name="gr5" draw:text-style-name="P4" xml:id="id10" draw:id="id10" draw:layer="layout" svg:width="1.905cm" svg:height="1.14cm" svg:x="5.209cm" svg:y="5.303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05cm" svg:x="5.21cm" svg:y="6.439cm">
          <text:p text:style-name="P3"><text:span text:style-name="T3">ag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16cm" svg:height="0.839cm" svg:x="4.777cm" svg:y="4.467cm">
          <draw:text-box>
            <text:p><text:span text:style-name="T3">@Person</text:span></text:p>
          </draw:text-box>
        </draw:frame>
        <draw:connector draw:style-name="gr11" draw:text-style-name="P4" draw:layer="layout" svg:x1="4.015cm" svg:y1="4.142cm" svg:x2="5.209cm" svg:y2="5.873cm" draw:start-shape="id9" draw:start-glue-point="1" draw:end-shape="id10" draw:end-glue-point="3" svg:d="M4015 4142h596v1731h598" svg:viewBox="0 0 1195 1732">
          <text:p/>
        </draw:connector>
        <draw:custom-shape draw:style-name="gr12" draw:text-style-name="P4" draw:layer="layout" svg:width="1.905cm" svg:height="1.14cm" svg:x="11.109cm" svg:y="2.103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905cm" svg:height="0.605cm" svg:x="11.11cm" svg:y="3.239cm">
          <text:p text:style-name="P3"><text:span text:style-name="T3">sea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905cm" svg:height="0.605cm" svg:x="11.111cm" svg:y="3.84cm">
          <text:p text:style-name="P3"><text:span text:style-name="T3">ag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92cm" svg:height="0.839cm" svg:x="11.077cm" svg:y="1.267cm">
          <draw:text-box>
            <text:p><text:span text:style-name="T3">@Car</text:span></text:p>
          </draw:text-box>
        </draw:frame>
        <draw:frame draw:style-name="gr9" draw:text-style-name="P7" draw:layer="layout" svg:width="3.561cm" svg:height="0.839cm" svg:x="3.175cm" svg:y="8.869cm">
          <draw:text-box>
            <text:p><text:span text:style-name="T4">Identity class</text:span></text:p>
          </draw:text-box>
        </draw:frame>
        <draw:frame draw:style-name="gr9" draw:text-style-name="P9" draw:layer="layout" svg:width="3.169cm" svg:height="0.839cm" svg:x="10.276cm" svg:y="8.87cm">
          <draw:text-box>
            <text:p text:style-name="P8"><text:span text:style-name="T5">Value class</text:span></text:p>
          </draw:text-box>
        </draw:frame>
        <draw:line draw:style-name="gr14" draw:text-style-name="P4" draw:layer="layout" svg:x1="8.955cm" svg:y1="1.035cm" svg:x2="8.955cm" svg:y2="9.925cm">
          <text:p/>
        </draw:line>
        <draw:custom-shape draw:style-name="gr2" draw:text-style-name="P4" draw:layer="layout" svg:width="1.905cm" svg:height="0.605cm" svg:x="5.211cm" svg:y="7.04cm">
          <text:p text:style-name="P3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905cm" svg:height="0.605cm" svg:x="11.112cm" svg:y="4.441cm">
          <text:p text:style-name="P3"><text:span text:style-name="T3">name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449cm" svg:height="0.802cm" svg:x="10.177cm" svg:y="9.471cm">
          <draw:text-box>
            <text:p text:style-name="P10"><text:span text:style-name="T6">null-restricted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2T08:55:59.489708000</meta:creation-date>
    <dc:date>2026-06-02T14:00:56.285817000</dc:date>
    <meta:editing-duration>PT4H29M18S</meta:editing-duration>
    <meta:editing-cycles>7</meta:editing-cycles>
    <meta:generator>LibreOffice/26.2.0.3$MacOSX_AARCH64 LibreOffice_project/afbbd0df0edb6d40b450b0337ac646b0913a760c</meta:generator>
    <meta:document-statistic meta:object-count="79"/>
  </office:meta>
</office:document-meta>
</file>